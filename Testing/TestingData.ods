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362in"/>
    </style:style>
    <style:style style:name="co3" style:family="table-column">
      <style:table-column-properties fo:break-before="auto" style:column-width="0.6346in"/>
    </style:style>
    <style:style style:name="co4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 style:data-style-name="N117"/>
    <style:style style:name="ce4" style:family="table-cell" style:parent-style-name="Default" style:data-style-name="N118">
      <style:table-cell-properties style:text-align-source="fix" style:repeat-content="false" fo:border="0.0138in solid #000000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border="0.0138in solid #000000"/>
      <style:paragraph-properties fo:text-align="end" fo:margin-left="0in"/>
    </style:style>
    <style:style style:name="ce6" style:family="table-cell" style:parent-style-name="Default" style:data-style-name="N117">
      <style:table-cell-properties fo:border="0.0138in solid #000000"/>
    </style:style>
    <style:style style:name="ce7" style:family="table-cell" style:parent-style-name="Bez_5f_názvu2">
      <style:table-cell-properties fo:background-color="#ff3333"/>
      <style:text-properties fo:color="#ffffff"/>
      <style:map style:condition="cell-content()='áno'" style:apply-style-name="Bez_5f_názvu1" style:base-cell-address="TrackDetection.D12"/>
      <style:map style:condition="cell-content()='nie'" style:apply-style-name="Bez_5f_názvu2" style:base-cell-address="TrackDetection.D12"/>
    </style:style>
    <style:style style:name="ce8" style:family="table-cell" style:parent-style-name="Default">
      <style:table-cell-properties fo:background-color="#00cc33"/>
      <style:text-properties fo:color="#ffffff"/>
      <style:map style:condition="cell-content()='áno'" style:apply-style-name="Bez_5f_názvu1" style:base-cell-address="TrackDetection.D12"/>
      <style:map style:condition="cell-content()='nie'" style:apply-style-name="Bez_5f_názvu2" style:base-cell-address="TrackDetection.D12"/>
    </style:style>
  </office:automatic-styles>
  <office:body>
    <office:spreadsheet>
      <table:table table:name="TrackDetection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6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Poradie</text:p>
          </table:table-cell>
          <table:table-cell table:style-name="ce1" office:value-type="string">
            <text:p>Čas</text:p>
          </table:table-cell>
          <table:table-cell table:style-name="ce1" office:value-type="string">
            <text:p>Opustil?</text:p>
          </table:table-cell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4" office:value-type="float" office:value="11.88">
            <text:p>11.88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4" office:value-type="float" office:value="12.35">
            <text:p>12.35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n/a</text:p>
          </table:table-cell>
          <table:table-cell table:style-name="ce8" office:value-type="string">
            <text:p>áno</text:p>
          </table:table-cell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4" office:value-type="float" office:value="13.13">
            <text:p>13.13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4" office:value-type="float" office:value="13.8">
            <text:p>13.80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4" office:value-type="float" office:value="12.48">
            <text:p>12.48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4" office:value-type="float" office:value="14.84">
            <text:p>14.84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4" office:value-type="float" office:value="12.89">
            <text:p>12.89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style-name="ce4" office:value-type="float" office:value="11.92">
            <text:p>11.92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style-name="ce4" office:value-type="float" office:value="11.38">
            <text:p>11.38 s</text:p>
          </table:table-cell>
          <table:table-cell table:style-name="ce7" office:value-type="string">
            <text:p>nie</text:p>
          </table:table-cell>
        </table:table-row>
        <table:table-row table:style-name="ro1">
          <table:table-cell/>
          <table:table-cell table:style-name="ce2" office:value-type="string">
            <text:p>Average</text:p>
          </table:table-cell>
          <table:table-cell table:style-name="ce6" table:formula="of:=AVERAGE([.C3:.C12])" office:value-type="time" office:time-value="PT305H47M12S">
            <text:p>12.00 s</text:p>
          </table:table-cell>
          <table:table-cell table:style-name="ce2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seconds number:style="long" number:decimal-places="2"/>
      <number:text> s</number:text>
    </number:time-style>
    <number:number-style style:name="N118">
      <number:number number:decimal-places="2" number:min-integer-digits="0"/>
      <number:text> s</number:text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5f_názvu1" style:display-name="Bez_názvu1" style:family="table-cell" style:parent-style-name="Default">
      <style:table-cell-properties fo:background-color="#ff3333"/>
    </style:style>
    <style:style style:name="Bez_5f_názvu2" style:display-name="Bez_názvu2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6">05/06/2026</text:date>, <text:time>23:19:22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Tisoň</meta:initial-creator>
    <meta:creation-date>2026-05-06T15:13:07</meta:creation-date>
    <dc:date>2026-05-06T23:19:22</dc:date>
    <dc:creator>Rudolf Tisoň</dc:creator>
    <meta:editing-duration>PT1H5M8S</meta:editing-duration>
    <meta:editing-cycles>4</meta:editing-cycles>
    <meta:generator>OpenOffice/4.1.15$Unix OpenOffice.org_project/4115m2$Build-9813</meta:generator>
    <meta:document-statistic meta:table-count="3" meta:cell-count="35" meta:object-count="0"/>
  </office:meta>
</office:document-meta>
</file>